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2C6F30F513.png" manifest:media-type="image/png"/>
  <manifest:file-entry manifest:full-path="Pictures/100000000000019000000136B37F1C84.png" manifest:media-type="image/png"/>
  <manifest:file-entry manifest:full-path="Pictures/10000000000001900000013177782E23.png" manifest:media-type="image/png"/>
  <manifest:file-entry manifest:full-path="Pictures/10000000000001900000011BB2C2EDCA.png" manifest:media-type="image/png"/>
  <manifest:file-entry manifest:full-path="Pictures/10000000000001900000012E82C9FA06.png" manifest:media-type="image/png"/>
  <manifest:file-entry manifest:full-path="Pictures/100000000000019000000136FFC24E70.png" manifest:media-type="image/png"/>
  <manifest:file-entry manifest:full-path="Pictures/100000000000019000000131D1BDDEDF.png" manifest:media-type="image/png"/>
  <manifest:file-entry manifest:full-path="Pictures/100000000000019000000131353B1859.png" manifest:media-type="image/png"/>
  <manifest:file-entry manifest:full-path="Pictures/10000000000001900000012E391B38C7.png" manifest:media-type="image/png"/>
  <manifest:file-entry manifest:full-path="Pictures/10000001000000EC000000F4678D01F3.png" manifest:media-type="image/png"/>
  <manifest:file-entry manifest:full-path="Pictures/1000000000000190000001173E761CCA.jpg" manifest:media-type="image/jpeg"/>
  <manifest:file-entry manifest:full-path="Pictures/1000000100000190000000E47D668C3C.png" manifest:media-type="image/png"/>
  <manifest:file-entry manifest:full-path="Pictures/1000000000000190000000A85C46BD23.png" manifest:media-type="image/png"/>
  <manifest:file-entry manifest:full-path="Pictures/1000000100000258000000EBC4C77C5F.png" manifest:media-type="image/png"/>
  <manifest:file-entry manifest:full-path="Pictures/10000000000001C3000001A20007C8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nstallation de Windows Server 2022 n’a pas vraiment changé par rapport aux versions précédentes </text:p>
      <text:p text:style-name="Standard"/>
      <text:p text:style-name="Standard"/>
      <text:p text:style-name="Text_20_body">Configuration minimum :</text:p>
      <text:list text:style-name="L1">
        <text:list-item>
          <text:p text:style-name="P2">Processeur : 1.4 GHz 64-bit </text:p>
          <text:list>
            <text:list-item>
              <text:list>
                <text:list-item>
                  <text:p text:style-name="P2">Compatible avec le jeu d’instructionsx64 </text:p>
                </text:list-item>
                <text:list-item>
                  <text:p text:style-name="P2">Prend en charge NX et DEP </text:p>
                </text:list-item>
                <text:list-item>
                  <text:p text:style-name="P2">Prend en charge CMPXCHG16b, LAHF/SAHF et PrefetchW </text:p>
                </text:list-item>
                <text:list-item>
                  <text:p text:style-name="P2">Prend en charge la traduction d’adresse de deuxième niveau (EPT ou NPT) </text:p>
                </text:list-item>
              </text:list>
            </text:list-item>
          </text:list>
        </text:list-item>
        <text:list-item>
          <text:p text:style-name="P2">RAM : 512 Mo </text:p>
          <text:list>
            <text:list-item>
              <text:list>
                <text:list-item>
                  <text:p text:style-name="P2">ECC conseillé </text:p>
                </text:list-item>
              </text:list>
            </text:list-item>
          </text:list>
        </text:list-item>
        <text:list-item>
          <text:p text:style-name="P1">Disque : 32 Go (minimum !!) </text:p>
        </text:list-item>
      </text:list>
      <text:p text:style-name="Text_20_body">Configuration conseillée :</text:p>
      <text:list text:style-name="L2">
        <text:list-item>
          <text:p text:style-name="P4">Carte réseau Ethernet capable d’au moins un débit en gigabits </text:p>
          <text:list>
            <text:list-item>
              <text:p text:style-name="P4">Conforme à la spécification de l’architecture PCI Express. </text:p>
            </text:list-item>
            <text:list-item>
              <text:p text:style-name="P4">Prend en charge l’environnement PXE (Preboot Execution Environment). </text:p>
            </text:list-item>
          </text:list>
        </text:list-item>
        <text:list-item>
          <text:p text:style-name="P4">Microprogramme et système UEFI 2.3.1c prenant en charge le démarrage sécurisé </text:p>
        </text:list-item>
        <text:list-item>
          <text:p text:style-name="P3">Module de plateforme sécurisée </text:p>
        </text:list-item>
      </text:list>
      <text:p text:style-name="Text_20_body">Installation de la Version standard, pas-à pas :</text:p>
      <text:p text:style-name="Text_20_body">Démarrer votre PC sur le DVD / la clef ou sur l’ISO.</text:p>
      <text:p text:style-name="Text_20_body">Sélectionnez la langue désirée, et cliquez sur suivant :</text:p>
      <text:p text:style-name="Text_20_body"><draw:a xlink:type="simple" xlink:href="https://www.toutwindows.com/wp-content/uploads/2022/02/image-2.png"><draw:frame draw:style-name="fr1" draw:name="Image1" text:anchor-type="as-char" svg:width="10.583cm" svg:height="7.938cm" draw:z-index="0"><draw:image xlink:href="Pictures/10000000000001900000012C6F30F513.png" xlink:type="simple" xlink:show="embed" xlink:actuate="onLoad" draw:mime-type="image/png"/><svg:title>image</svg:title></draw:frame></draw:a></text:p>
      <text:p text:style-name="Text_20_body">Cliquez sur Installer maintenant</text:p>
      <text:p text:style-name="Text_20_body"><text:soft-page-break/><draw:a xlink:type="simple" xlink:href="https://www.toutwindows.com/wp-content/uploads/2022/02/image-3.png"><draw:frame draw:style-name="fr1" draw:name="Image2" text:anchor-type="as-char" svg:width="10.583cm" svg:height="8.202cm" draw:z-index="1"><draw:image xlink:href="Pictures/100000000000019000000136B37F1C84.png" xlink:type="simple" xlink:show="embed" xlink:actuate="onLoad" draw:mime-type="image/png"/><svg:title>image</svg:title></draw:frame></draw:a></text:p>
      <text:p text:style-name="Text_20_body">Saisissez la clef de produit (ou choisissez de la saisir plus tard) :</text:p>
      <text:p text:style-name="Text_20_body"><draw:a xlink:type="simple" xlink:href="https://www.toutwindows.com/wp-content/uploads/2022/02/image-4.png"><draw:frame draw:style-name="fr1" draw:name="Image3" text:anchor-type="as-char" svg:width="10.583cm" svg:height="7.488cm" draw:z-index="2"><draw:image xlink:href="Pictures/10000000000001900000011BB2C2EDCA.png" xlink:type="simple" xlink:show="embed" xlink:actuate="onLoad" draw:mime-type="image/png"/><svg:title>image</svg:title></draw:frame></draw:a></text:p>
      <text:p text:style-name="Text_20_body">Choix du type d’installation :</text:p>
      <text:p text:style-name="Text_20_body">Attention le choix peut varier suivant la clef de produit saisie, ici nous allons choisir la version Windows Server 2022 Standard (expérience du bureau)  :</text:p>
      <text:p text:style-name="Text_20_body"><text:soft-page-break/><draw:a xlink:type="simple" xlink:href="https://www.toutwindows.com/wp-content/uploads/2022/02/image-5.png"><draw:frame draw:style-name="fr1" draw:name="Image4" text:anchor-type="as-char" svg:width="10.583cm" svg:height="8.07cm" draw:z-index="3"><draw:image xlink:href="Pictures/100000000000019000000131D1BDDEDF.png" xlink:type="simple" xlink:show="embed" xlink:actuate="onLoad" draw:mime-type="image/png"/><svg:title>image</svg:title></draw:frame></draw:a></text:p>
      <text:p text:style-name="Text_20_body">Acceptez le contrat de licence :</text:p>
      <text:p text:style-name="Text_20_body"><draw:a xlink:type="simple" xlink:href="https://www.toutwindows.com/wp-content/uploads/2022/02/image-6.png"><draw:frame draw:style-name="fr1" draw:name="Image5" text:anchor-type="as-char" svg:width="10.583cm" svg:height="7.99cm" draw:z-index="4"><draw:image xlink:href="Pictures/10000000000001900000012E82C9FA06.png" xlink:type="simple" xlink:show="embed" xlink:actuate="onLoad" draw:mime-type="image/png"/><svg:title>image</svg:title></draw:frame></draw:a></text:p>
      <text:p text:style-name="Text_20_body">Sélectionnez ensuite le type d’installation, personnellement je ne vous recommande jamais de faire une mise à jour pour un serveur en production :</text:p>
      <text:p text:style-name="Text_20_body"><text:soft-page-break/><draw:a xlink:type="simple" xlink:href="https://www.toutwindows.com/wp-content/uploads/2022/02/image-7.png"><draw:frame draw:style-name="fr1" draw:name="Image6" text:anchor-type="as-char" svg:width="10.583cm" svg:height="8.202cm" draw:z-index="5"><draw:image xlink:href="Pictures/100000000000019000000136FFC24E70.png" xlink:type="simple" xlink:show="embed" xlink:actuate="onLoad" draw:mime-type="image/png"/><svg:title>image</svg:title></draw:frame></draw:a></text:p>
      <text:p text:style-name="Text_20_body">Sélectionnez le disque et la partition sur lesquels vous souhaitez installer le système (minimum 32 Go) puis cliquez sur Suivant :</text:p>
      <text:p text:style-name="Text_20_body"><draw:a xlink:type="simple" xlink:href="https://www.toutwindows.com/wp-content/uploads/2022/02/image-8.png"><draw:frame draw:style-name="fr1" draw:name="Image7" text:anchor-type="as-char" svg:width="10.583cm" svg:height="8.07cm" draw:z-index="6"><draw:image xlink:href="Pictures/10000000000001900000013177782E23.png" xlink:type="simple" xlink:show="embed" xlink:actuate="onLoad" draw:mime-type="image/png"/><svg:title>image</svg:title></draw:frame></draw:a></text:p>
      <text:p text:style-name="Text_20_body">Si vous ne voyez pas de disque dans la liste, il est possible que la carte contrôleur de votre disque (SCSI, RAID, …) nécessite un pilote spécial, dans ce cas, cliquez sur “Charger un pilote”.</text:p>
      <text:p text:style-name="Text_20_body">l’installation commence :</text:p>
      <text:p text:style-name="Text_20_body"><text:soft-page-break/><draw:a xlink:type="simple" xlink:href="https://www.toutwindows.com/wp-content/uploads/2022/02/image-9.png"><draw:frame draw:style-name="fr1" draw:name="Image8" text:anchor-type="as-char" svg:width="10.583cm" svg:height="8.07cm" draw:z-index="7"><draw:image xlink:href="Pictures/100000000000019000000131353B1859.png" xlink:type="simple" xlink:show="embed" xlink:actuate="onLoad" draw:mime-type="image/png"/><svg:title>image</svg:title></draw:frame></draw:a></text:p>
      <text:p text:style-name="Text_20_body">Le serveur va redémarrer… plusieurs fois.</text:p>
      <text:p text:style-name="Text_20_body"><draw:a xlink:type="simple" xlink:href="https://www.toutwindows.com/wp-content/uploads/2018/12/image-7.png"><draw:frame draw:style-name="fr1" draw:name="Image9" text:anchor-type="as-char" svg:width="6.244cm" svg:height="6.456cm" draw:z-index="8"><draw:image xlink:href="Pictures/10000001000000EC000000F4678D01F3.png" xlink:type="simple" xlink:show="embed" xlink:actuate="onLoad" draw:mime-type="image/png"/><svg:title>image</svg:title></draw:frame></draw:a></text:p>
      <text:p text:style-name="Text_20_body">A la fin de l’installation, vous devez définir le mot de passe du compte Administrateur, avec un minimum de complexité :</text:p>
      <text:p text:style-name="Text_20_body"><draw:a xlink:type="simple" xlink:href="http://www.toutwindows.com/wp-content/uploads/2016/09/clip_image018.jpg"><draw:frame draw:style-name="fr1" draw:name="Image10" text:anchor-type="as-char" svg:width="10.583cm" svg:height="7.382cm" draw:z-index="9"><draw:image xlink:href="Pictures/1000000000000190000001173E761CCA.jpg" xlink:type="simple" xlink:show="embed" xlink:actuate="onLoad" draw:mime-type="image/jpeg"/><svg:title>clip_image018</svg:title></draw:frame></draw:a></text:p>
      <text:p text:style-name="Text_20_body">Vous pouvez ouvrir la session en saisissant le mot de passe :</text:p>
      <text:p text:style-name="Text_20_body"><text:soft-page-break/><draw:a xlink:type="simple" xlink:href="https://www.toutwindows.com/wp-content/uploads/2018/12/image-8.png"><draw:frame draw:style-name="fr1" draw:name="Image11" text:anchor-type="as-char" svg:width="10.583cm" svg:height="6.033cm" draw:z-index="10"><draw:image xlink:href="Pictures/1000000100000190000000E47D668C3C.png" xlink:type="simple" xlink:show="embed" xlink:actuate="onLoad" draw:mime-type="image/png"/><svg:title>image</svg:title></draw:frame></draw:a></text:p>
      <text:p text:style-name="Text_20_body">Et voici le bureau, ressemblant, évidemment à celui de Windows 10, enfin avec Edge intégré :</text:p>
      <text:p text:style-name="Text_20_body"><draw:a xlink:type="simple" xlink:href="https://www.toutwindows.com/wp-content/uploads/2022/02/image-10.png"><draw:frame draw:style-name="fr1" draw:name="Image12" text:anchor-type="as-char" svg:width="10.583cm" svg:height="7.99cm" draw:z-index="11"><draw:image xlink:href="Pictures/10000000000001900000012E391B38C7.png" xlink:type="simple" xlink:show="embed" xlink:actuate="onLoad" draw:mime-type="image/png"/><svg:title>image</svg:title></draw:frame></draw:a></text:p>
      <text:p text:style-name="Text_20_body">Maintenant que vous avez ouvert votre session, vous pouvez découvrir le Gestionnaire de Serveur :</text:p>
      <text:p text:style-name="Text_20_body"><draw:a xlink:type="simple" xlink:href="https://www.toutwindows.com/wp-content/uploads/2022/02/image-11.png"><draw:frame draw:style-name="fr1" draw:name="Image13" text:anchor-type="as-char" svg:width="10.583cm" svg:height="4.445cm" draw:z-index="12"><draw:image xlink:href="Pictures/1000000000000190000000A85C46BD23.png" xlink:type="simple" xlink:show="embed" xlink:actuate="onLoad" draw:mime-type="image/png"/><svg:title>image</svg:title></draw:frame></draw:a></text:p>
      <text:p text:style-name="Text_20_body">Et je vous suggère de faire immédiatement les tâches de base suivantes :</text:p>
      <text:p text:style-name="Text_20_body">Cliquez sur 1 – Configurer ce serveur local:</text:p>
      <text:p text:style-name="Text_20_body"><text:soft-page-break/><draw:a xlink:type="simple" xlink:href="https://www.toutwindows.com/wp-content/uploads/2018/12/image-11.png"><draw:frame draw:style-name="fr1" draw:name="Image14" text:anchor-type="as-char" svg:width="15.875cm" svg:height="6.218cm" draw:z-index="13"><draw:image xlink:href="Pictures/1000000100000258000000EBC4C77C5F.png" xlink:type="simple" xlink:show="embed" xlink:actuate="onLoad" draw:mime-type="image/png"/><svg:title>image</svg:title></draw:frame></draw:a></text:p>
      <text:p text:style-name="Text_20_body">Et définissez le nom et le domaine éventuel de votre serveur</text:p>
      <text:p text:style-name="Text_20_body">Définissez ensuite l’adresse (ou les adresses) IP de votre serveur</text:p>
      <text:p text:style-name="Text_20_body"><draw:a xlink:type="simple" xlink:href="https://www.toutwindows.com/wp-content/uploads/2022/02/image-12.png"><draw:frame draw:style-name="fr1" draw:name="Image15" text:anchor-type="as-char" svg:width="11.933cm" svg:height="11.06cm" draw:z-index="14"><draw:image xlink:href="Pictures/10000000000001C3000001A20007C819.png" xlink:type="simple" xlink:show="embed" xlink:actuate="onLoad" draw:mime-type="image/png"/><svg:title>image</svg:title></draw:frame></draw:a></text:p>
      <text:p text:style-name="Text_20_body">L’installation est terminée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2T19:01:18.665000000</meta:creation-date>
    <dc:date>2026-03-22T19:03:02.267000000</dc:date>
    <meta:editing-duration>PT1M44S</meta:editing-duration>
    <meta:editing-cycles>1</meta:editing-cycles>
    <meta:document-statistic meta:table-count="0" meta:image-count="15" meta:object-count="0" meta:page-count="7" meta:paragraph-count="53" meta:word-count="400" meta:character-count="2382" meta:non-whitespace-character-count="2017"/>
    <meta:generator>LibreOffice/24.2.3.2$Windows_X86_64 LibreOffice_project/433d9c2ded56988e8a90e6b2e771ee4e6a5ab2ba</meta:generator>
  </office:meta>
</office:document-meta>
</file>